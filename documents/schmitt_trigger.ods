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80000000600E9F3118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14.949cm" svg:height="10.823cm" svg:x="18.687cm" svg:y="0.68cm">
            <draw:image xlink:href="Pictures/100000000000080000000600E9F3118B.jpg" xlink:type="simple" xlink:show="embed" xlink:actuate="onLoad" draw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hu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phase current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Oh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 shunt</text:p>
          </table:table-cell>
          <table:table-cell table:formula="of:=[.C3]*[.C5]" office:value-type="float" office:value="50" calcext:value-type="float">
            <text:p>50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D84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F1</text:p>
          </table:table-cell>
          <table:table-cell table:style-name="ce2"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mid (zero curr.)</text:p>
          </table:table-cell>
          <table:table-cell table:formula="of:=[.C11]/2" office:value-type="float" office:value="1.65" calcext:value-type="float">
            <text:p>1,6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hmitt Trigg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 turn high</text:p>
          </table:table-cell>
          <table:table-cell table:formula="of:=[.C12]+20*[.C7]/1000" office:value-type="float" office:value="2.65" calcext:value-type="float">
            <text:p>2,6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hysteresis</text:p>
          </table:table-cell>
          <table:table-cell table:formula="of:=[.C4]*[.C5]*20/1000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turn low</text:p>
          </table:table-cell>
          <table:table-cell table:formula="of:=[.C16]-[.C17]" office:value-type="float" office:value="2.55" calcext:value-type="float">
            <text:p>2,5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_FB</text:p>
          </table:table-cell>
          <table:table-cell table:formula="of:=[.C11]/[.C17]-1" office:value-type="float" office:value="32" calcext:value-type="float">
            <text:p>32</text:p>
          </table:table-cell>
          <table:table-cell/>
          <table:table-cell office:value-type="string" calcext:value-type="string">
            <text:p>factor how much bigger the FB resistor must be</text:p>
          </table:table-cell>
        </table:table-row>
        <table:table-row table:style-name="ro1">
          <table:table-cell/>
          <table:table-cell office:value-type="string" calcext:value-type="string">
            <text:p>U_DAC</text:p>
          </table:table-cell>
          <table:table-cell table:formula="of:=[.C18]*([.C20]+1)/[.C20]" office:value-type="float" office:value="2.6296875" calcext:value-type="float">
            <text:p>2,6296875</text:p>
          </table:table-cell>
          <table:table-cell office:value-type="string" calcext:value-type="string">
            <text:p>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.00.0000</text:date>, <text:time style:data-style-name="N2" text:time-value="15:56:46.25739871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5:22:13.395046980</meta:creation-date>
    <dc:date>2026-01-26T15:59:14.005824546</dc:date>
    <meta:editing-duration>PT36M30S</meta:editing-duration>
    <meta:editing-cycles>10</meta:editing-cycles>
    <meta:generator>LibreOffice/24.2.7.2$Linux_X86_64 LibreOffice_project/420$Build-2</meta:generator>
    <meta:document-statistic meta:table-count="1" meta:cell-count="36" meta:object-count="1"/>
  </office:meta>
</office:document-meta>
</file>